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1460" officeooo:paragraph-rsid="00011460" style:font-weight-asian="bold" style:font-weight-complex="bold"/>
    </style:style>
    <style:style style:name="P2" style:family="paragraph" style:parent-style-name="Standard">
      <style:text-properties officeooo:rsid="0000d517" officeooo:paragraph-rsid="0000d517"/>
    </style:style>
    <style:style style:name="P3" style:family="paragraph" style:parent-style-name="Standard">
      <style:paragraph-properties fo:text-align="center" style:justify-single-word="false"/>
      <style:text-properties fo:font-weight="bold" officeooo:rsid="0000d517" officeooo:paragraph-rsid="00027a37" style:font-weight-asian="bold" style:font-weight-complex="bold"/>
    </style:style>
    <style:style style:name="P4" style:family="paragraph" style:parent-style-name="Standard">
      <style:paragraph-properties fo:text-align="start" style:justify-single-word="false"/>
      <style:text-properties fo:font-weight="normal" officeooo:rsid="00011460" officeooo:paragraph-rsid="00027a37" style:font-weight-asian="normal" style:font-weight-complex="normal"/>
    </style:style>
    <style:style style:name="P5" style:family="paragraph" style:parent-style-name="Standard">
      <style:text-properties officeooo:rsid="0000d517" officeooo:paragraph-rsid="00011460"/>
    </style:style>
    <style:style style:name="P6" style:family="paragraph" style:parent-style-name="Standard">
      <style:paragraph-properties fo:break-before="page"/>
      <style:text-properties officeooo:rsid="007efa12" officeooo:paragraph-rsid="0006d8d0"/>
    </style:style>
    <style:style style:name="P7" style:family="paragraph" style:parent-style-name="Standard">
      <style:text-properties officeooo:rsid="007efa12" officeooo:paragraph-rsid="0006d8d0"/>
    </style:style>
    <style:style style:name="P8" style:family="paragraph" style:parent-style-name="Standard">
      <style:text-properties officeooo:rsid="007efa12" officeooo:paragraph-rsid="00902441"/>
    </style:style>
    <style:style style:name="P9" style:family="paragraph" style:parent-style-name="Footnote">
      <style:paragraph-properties fo:margin-left="0cm" fo:text-indent="0cm" style:auto-text-indent="false"/>
      <style:text-properties officeooo:paragraph-rsid="0096632e"/>
    </style:style>
    <style:style style:name="P10" style:family="paragraph" style:parent-style-name="Standard">
      <style:text-properties officeooo:rsid="00989653" officeooo:paragraph-rsid="00989653"/>
    </style:style>
    <style:style style:name="P11" style:family="paragraph" style:parent-style-name="Standard">
      <style:text-properties officeooo:rsid="0098a53c" officeooo:paragraph-rsid="009fefba"/>
    </style:style>
    <style:style style:name="P12" style:family="paragraph" style:parent-style-name="Standard">
      <style:text-properties officeooo:rsid="009fefba" officeooo:paragraph-rsid="009fefba"/>
    </style:style>
    <style:style style:name="P13" style:family="paragraph" style:parent-style-name="Footnote">
      <style:paragraph-properties fo:margin-left="0cm" fo:text-indent="0cm" style:auto-text-indent="false"/>
    </style:style>
    <style:style style:name="P14" style:family="paragraph" style:parent-style-name="Standard">
      <style:text-properties officeooo:rsid="00a06a26" officeooo:paragraph-rsid="00a06a26"/>
    </style:style>
    <style:style style:name="T1" style:family="text">
      <style:text-properties officeooo:rsid="008e237f"/>
    </style:style>
    <style:style style:name="T2" style:family="text">
      <style:text-properties officeooo:rsid="003e29e5"/>
    </style:style>
    <style:style style:name="T3" style:family="text">
      <style:text-properties officeooo:rsid="0095eb5e"/>
    </style:style>
    <style:style style:name="T4" style:family="text">
      <style:text-properties officeooo:rsid="007efa12"/>
    </style:style>
    <style:style style:name="T5" style:family="text">
      <style:text-properties officeooo:rsid="0096fa2b"/>
    </style:style>
    <style:style style:name="T6" style:family="text">
      <style:text-properties officeooo:rsid="0097f0e5"/>
    </style:style>
    <style:style style:name="T7" style:family="text">
      <style:text-properties officeooo:rsid="00995241"/>
    </style:style>
    <style:style style:name="T8" style:family="text">
      <style:text-properties officeooo:rsid="009a3486"/>
    </style:style>
    <style:style style:name="T9" style:family="text">
      <style:text-properties officeooo:rsid="009d2e3a"/>
    </style:style>
    <style:style style:name="T10" style:family="text">
      <style:text-properties officeooo:rsid="009bd736"/>
    </style:style>
    <style:style style:name="T11" style:family="text">
      <style:text-properties officeooo:rsid="00a1d0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TEC – Empresa de Tecnologias do Município de Juiz de Fo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Proposta de arquitetura para o projeto GRP</text:span><text:line-break/><text:line-break/><text:line-break/><text:line-break/><text:line-break/><text:line-break/><text:line-break/><text:line-break/><text:line-break/><text:line-break/><text:line-break/><text:line-break/><text:line-break/><text:line-break/></text:p>
      <text:p text:style-name="P4">Marcelo Palacio Abreu – Analista de sistemas II, Arquiteto de soluções<text:line-break/>Bacharel em Sistemas de Informação, Graduando em Direito e Contabilidade, <text:span text:style-name="T2">Especialista em Projetos de Computação em Nuvem</text:span></text:p>
      <text:p text:style-name="P5"/>
      <text:p text:style-name="P5"/>
      <text:p text:style-name="P6">1 - Introdução</text:p>
      <text:p text:style-name="P7"/>
      <text:p text:style-name="P7">A estratégia da EMTEC é desenvolver o GRP na forma de um conjunto de módulos interdependentes. Porém a experiência com sistemas herdados como SIFAN, demonstram que o software utilizado na PJF tem ciclo de vida de décadas. Portanto é necessário estabelecer uma arquitetura compatível com essa característica. Promovendo facilidade de desenvolvimento e manutenção em equipes de tamanho variável<text:note text:id="ftn0" text:note-class="footnote"><text:note-citation>1</text:note-citation><text:note-body><text:p text:style-name="P8"><text:s/>- Desenvolver “só” não pode ser um problema. Assim como desenvolver em um ou múltiplos esquadrões também não. Deve ser possível fazer alterações concentradas sem regredir outras partes da aplicação por impactos arquiteturais ou débito técnico. Por exemplo, quando as regras de negócio estão distribuídas nos controladores de API, então quando se altera a lógica em uma rota é necessário buscar manualmente os impactos. Portanto é impossível fazer uma alteração e garantir que a próxima versão esteja pronta para uso. Essa situação piora mais quando o número de módulos aumenta.</text:p></text:note-body></text:note>, baixo acoplamento, independência da tecnologia de banco de dados e da interface gráfica.</text:p>
      <text:p text:style-name="P7"/>
      <text:p text:style-name="P7">2 - A arquitetura</text:p>
      <text:p text:style-name="P7"/>
      <text:p text:style-name="P7">2.1 - Persistência</text:p>
      <text:p text:style-name="P7"/>
      <text:p text:style-name="P7">A persistência deve ser desacoplada do restante do software e cumprir função única: Permitir o controle das informações na base de dados. Porém existem inúmeros SGBDs e inúmeras tecnologias de persistência. Portanto, a aplicação deve dispor de uma camada de aplicação, preferencialmente intermediada for bibliotecas especialistas em persistência e apoiadas sobre uma arquitetura que permita substituir toda a implementação conforme a necessidade. O fluxo a seguir demonstra o funcionamento de um pacote de persistência que torna a aplicação independente da tecnologia utilizada, onde a implementação o contrato do repositório de dados expõe os métodos necessários a toda a aplicação, possibilitando mudar a tecnologia de persistência sobrescrevendo a implementação.</text:p>
      <text:p text:style-name="P7"/>
      <text:p text:style-name="P7"><text:span text:style-name="T3">(1) </text:span>BANCO DE DADOS → <text:span text:style-name="T3">(2) </text:span>BIBLIOTECA DE PERSISTÊNCIA → <text:span text:style-name="T3">(3) </text:span>IMPLEMENTAÇÃO DA PERSISTÊNCIA → <text:span text:style-name="T3">(4) </text:span>CONTRATO DA PERSISTÊNCIA → <text:span text:style-name="T3">(5) </text:span>OPERAÇÕES DISPONÍVEIS</text:p>
      <text:p text:style-name="P7"/>
      <text:p text:style-name="P7">2.2 - Regras de negócio</text:p>
      <text:p text:style-name="P7"/>
      <text:p text:style-name="P7">As regras de negócio, em geral devem ser fortemente hierarquizadas<text:note text:id="ftn1" text:note-class="footnote"><text:note-citation>2</text:note-citation><text:note-body><text:p text:style-name="P9"><text:s/>- <text:span text:style-name="T4">A hierarquização permite definir tantos graus de responsabilidade quanto o modelo demande. Por exemplo: Serviços de domínio <text:s/>queles que definem operações atômicas e básicas sobre uma determinada classe. Serviços de orquestração, os que orquestram fluxos inteiros, demandando alto </text:span><text:span text:style-name="T5">nível de </text:span><text:span text:style-name="T4">controle sobre transações e garantias de estado. Como acontece na operação hipotética de transferência de saldo: verifica a fonte, subtrai da fonte soma no destino confirma a operação, serviços vinculados, são uma exceção a regra, aqueles que inevitavelmente tocam a implementação técnica, nesse caso, o ideal é manter apenas a interface e delegar a implementação para a aplicação que consumir o pacote.</text:span></text:p></text:note-body></text:note>[2], independentes de tecnologia e desacopladas. Isso garante que a análise dependa apenas da interpretação de código básico, facilitando uma futura sobrescrita evita a contaminação com tipos de outras camadas e impede problemas básicos de projeto.</text:p>
      <text:p text:style-name="P7"/>
      <text:p text:style-name="P7">2.3 - Interface de comunicação e de usuário</text:p>
      <text:p text:style-name="P7"/>
      <text:p text:style-name="P7">Aplicações verdadeiramente resilientes, desacopladas e <text:span text:style-name="T6">criteriosamente</text:span> arquitetadas dispõe de metadados para definição de suas extremidades, interfaces e fluxos, permitindo inclusive a alteração do invólucro e de toda a camada de interface através da simples substituição. Por exemplo, ao desenvolver uma aplicação foram definidas todas as rotas, controles, ações e permissões em uma <text:soft-page-break/>especificação própria, portanto, é possível interpretar essas informações e gerar a estrutura do involucro que executará a retaguarda.</text:p>
      <text:p text:style-name="P7"/>
      <text:p text:style-name="P7">Da mesma forma, as telas utilizadas para interação e os fluxos foram definidos em arquivos de metadados intermediários, então para criar suporte a uma nova plataforma, ou até mesmo atualizar a tecnologia de exibição de acordo com os padrões mais recentes.</text:p>
      <text:p text:style-name="P7"/>
      <text:p text:style-name="P10">3 – Proposta</text:p>
      <text:p text:style-name="P10"/>
      <text:p text:style-name="P11"><text:span text:style-name="T7">Para o atendimento das características apresentadas e o maior nível de independência propõe-se construir o projeto sobre </text:span>a linguagem Csharp executada sobre o .NET Core para desenvolver os projetos de entidades, <text:span text:style-name="T7">persistência, repositórios, serviços, e invólucro (nesse caso o projeto de API).<text:line-break/></text:span></text:p>
      <text:p text:style-name="P12">3.1 – A plataforma .NET Core</text:p>
      <text:p text:style-name="P11"><text:span text:style-name="T7"><text:line-break/>A plataforma suporta múltiplas plataformas, possibilitando a escolha e até mudanças no decorrer do tempo. Também observa-se alto nível de compatibilidade com a computação paralela através da abstração de instruções SIMD</text:span><text:span text:style-name="T7"><text:note text:id="ftn2" text:note-class="footnote"><text:note-citation>3</text:note-citation><text:note-body><text:p text:style-name="P13"><text:s/>- <text:span text:style-name="T8">São instruções para processamento de informações vetoriais amplamente disponíveis na arquitetura x86. Por exemplo: SSE, SSE2 e AVX.</text:span></text:p></text:note-body></text:note></text:span><text:span text:style-name="T7">. A interface “Vector” por exemplo abstrai o processamento de matrizes em paralelo, tornando operações de computação massiva mais rápidas, </text:span><text:span text:style-name="T9">na casa das centenas de vezes</text:span><text:span text:style-name="T7">. </text:span><text:span text:style-name="T10">Outras linguagens costumam depender de bibliotecas ou até, módulos compilados para binário nativo.</text:span></text:p>
      <text:p text:style-name="P11"/>
      <text:p text:style-name="P14">3.2 – Persistência</text:p>
      <text:p text:style-name="P14"/>
      <text:p text:style-name="P14">A persistência será mediada pelo Entity Framework. Uma base de código que por si só possibilita a utilização de SGBDs relacionais e não relacionais, como: MySQL, SQL Server, Postgresql, MongoDB, etc… <text:span text:style-name="T11">Além de dispor do LINQ, uma linguagem de pesquisa intermediária, imutável </text:span></text:p>
      <text:p text:style-name="P7"/>
      <text:p text:style-name="P7">3 - Conclusão</text:p>
      <text:p text:style-name="P7"/>
      <text:p text:style-name="P7">Desta forma, espera-se desenvolver uma aplicação que suporte a constante evolução da tecnologia, possibilitando a evolução independente e em última instância, a substituição indolor, adaptação ou compatibilização das peças desenvolvidas <text:span text:style-name="T11">no caso de surgimento de imprevistos que demandem contingência.</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1T15:22:57.762725900</meta:creation-date>
    <dc:date>2026-07-02T12:27:46.124730100</dc:date>
    <meta:editing-duration>PT22H43M22S</meta:editing-duration>
    <meta:editing-cycles>157</meta:editing-cycles>
    <meta:generator>LibreOffice/25.2.7.2$Windows_X86_64 LibreOffice_project/5cbfd1ab6520636bb5f7b99185aa69bd7456825d</meta:generator>
    <meta:print-date>2026-06-12T13:27:05.816476900</meta:print-date>
    <meta:printed-by>Arquivos PDF</meta:printed-by>
    <meta:document-statistic meta:table-count="0" meta:image-count="0" meta:object-count="0" meta:page-count="3" meta:paragraph-count="25" meta:word-count="841" meta:character-count="5737" meta:non-whitespace-character-count="4895"/>
  </office:meta>
</office:document-meta>
</file>