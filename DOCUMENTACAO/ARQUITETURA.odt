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C84000006BC5C240520.png" manifest:media-type="image/png"/>
  <manifest:file-entry manifest:full-path="Pictures/1000000100000C5C00000AC0FB319A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fo:margin-top="0cm" fo:margin-bottom="0cm" table:align="margins"/>
    </style:style>
    <style:style style:name="Tabela1.A" style:family="table-column">
      <style:table-column-properties style:column-width="8.5cm" style:rel-column-width="32767*"/>
    </style:style>
    <style:style style:name="Tabela1.A1" style:family="table-cell">
      <style:table-cell-properties style:vertical-align="middle" fo:padding="0.199cm" fo:border="none" style:writing-mode="page"/>
    </style:style>
    <style:style style:name="P1" style:family="paragraph" style:parent-style-name="Standard">
      <style:paragraph-properties fo:text-align="center" style:justify-single-word="false"/>
      <style:text-properties fo:font-weight="bold" officeooo:rsid="00011460" officeooo:paragraph-rsid="00011460" style:font-weight-asian="bold" style:font-weight-complex="bold"/>
    </style:style>
    <style:style style:name="P2" style:family="paragraph" style:parent-style-name="Standard">
      <style:text-properties officeooo:rsid="0000d517" officeooo:paragraph-rsid="0000d517"/>
    </style:style>
    <style:style style:name="P3" style:family="paragraph" style:parent-style-name="Standard">
      <style:paragraph-properties fo:text-align="center" style:justify-single-word="false"/>
      <style:text-properties fo:font-weight="bold" officeooo:rsid="0000d517" officeooo:paragraph-rsid="00027a37" style:font-weight-asian="bold" style:font-weight-complex="bold"/>
    </style:style>
    <style:style style:name="P4" style:family="paragraph" style:parent-style-name="Standard">
      <style:paragraph-properties fo:text-align="start" style:justify-single-word="false"/>
      <style:text-properties fo:font-weight="normal" officeooo:rsid="00011460" officeooo:paragraph-rsid="00027a37" style:font-weight-asian="normal" style:font-weight-complex="normal"/>
    </style:style>
    <style:style style:name="P5" style:family="paragraph" style:parent-style-name="Standard">
      <style:text-properties officeooo:rsid="0000d517" officeooo:paragraph-rsid="00011460"/>
    </style:style>
    <style:style style:name="P6" style:family="paragraph" style:parent-style-name="Standard">
      <style:paragraph-properties fo:break-before="page"/>
      <style:text-properties fo:font-weight="bold" officeooo:rsid="007efa12" officeooo:paragraph-rsid="0006d8d0" style:font-weight-asian="bold" style:font-weight-complex="bold"/>
    </style:style>
    <style:style style:name="P7" style:family="paragraph" style:parent-style-name="Standard">
      <style:text-properties officeooo:rsid="007efa12" officeooo:paragraph-rsid="0006d8d0"/>
    </style:style>
    <style:style style:name="P8" style:family="paragraph" style:parent-style-name="Standard">
      <style:paragraph-properties fo:text-align="justify" style:justify-single-word="false"/>
      <style:text-properties officeooo:rsid="007efa12" officeooo:paragraph-rsid="0006d8d0"/>
    </style:style>
    <style:style style:name="P9" style:family="paragraph" style:parent-style-name="Standard">
      <style:text-properties officeooo:rsid="007efa12" officeooo:paragraph-rsid="00902441"/>
    </style:style>
    <style:style style:name="P10" style:family="paragraph" style:parent-style-name="Standard">
      <style:text-properties fo:font-weight="bold" officeooo:rsid="007efa12" officeooo:paragraph-rsid="0006d8d0" style:font-weight-asian="bold" style:font-weight-complex="bold"/>
    </style:style>
    <style:style style:name="P11" style:family="paragraph" style:parent-style-name="Footnote">
      <style:paragraph-properties fo:margin-left="0cm" fo:text-indent="0cm" style:auto-text-indent="false"/>
      <style:text-properties officeooo:paragraph-rsid="0096632e"/>
    </style:style>
    <style:style style:name="P12" style:family="paragraph" style:parent-style-name="Standard">
      <style:paragraph-properties fo:text-align="justify" style:justify-single-word="false"/>
      <style:text-properties fo:font-weight="bold" officeooo:rsid="007efa12" officeooo:paragraph-rsid="0006d8d0" style:font-weight-asian="bold" style:font-weight-complex="bold"/>
    </style:style>
    <style:style style:name="P13" style:family="paragraph" style:parent-style-name="Standard">
      <style:text-properties fo:font-weight="bold" officeooo:rsid="00989653" officeooo:paragraph-rsid="00989653" style:font-weight-asian="bold" style:font-weight-complex="bold"/>
    </style:style>
    <style:style style:name="P14" style:family="paragraph" style:parent-style-name="Standard">
      <style:text-properties officeooo:rsid="00989653" officeooo:paragraph-rsid="00989653"/>
    </style:style>
    <style:style style:name="P15" style:family="paragraph" style:parent-style-name="Standard">
      <style:paragraph-properties fo:text-align="justify" style:justify-single-word="false"/>
      <style:text-properties officeooo:rsid="0098a53c" officeooo:paragraph-rsid="009fefba"/>
    </style:style>
    <style:style style:name="P16" style:family="paragraph" style:parent-style-name="Standard">
      <style:text-properties fo:font-weight="bold" officeooo:rsid="009fefba" officeooo:paragraph-rsid="009fefba" style:font-weight-asian="bold" style:font-weight-complex="bold"/>
    </style:style>
    <style:style style:name="P17" style:family="paragraph" style:parent-style-name="Footnote">
      <style:paragraph-properties fo:margin-left="0cm" fo:text-indent="0cm" style:auto-text-indent="false"/>
    </style:style>
    <style:style style:name="P18" style:family="paragraph" style:parent-style-name="Standard">
      <style:text-properties officeooo:rsid="0098a53c" officeooo:paragraph-rsid="009fefba"/>
    </style:style>
    <style:style style:name="P19" style:family="paragraph" style:parent-style-name="Standard">
      <style:text-properties fo:font-weight="bold" officeooo:rsid="00a06a26" officeooo:paragraph-rsid="00a06a26" style:font-weight-asian="bold" style:font-weight-complex="bold"/>
    </style:style>
    <style:style style:name="P20" style:family="paragraph" style:parent-style-name="Standard">
      <style:text-properties officeooo:rsid="00a06a26" officeooo:paragraph-rsid="00a06a26"/>
    </style:style>
    <style:style style:name="P21" style:family="paragraph" style:parent-style-name="Standard">
      <style:paragraph-properties fo:text-align="justify" style:justify-single-word="false"/>
      <style:text-properties officeooo:rsid="00a06a26" officeooo:paragraph-rsid="00a06a26"/>
    </style:style>
    <style:style style:name="P22" style:family="paragraph" style:parent-style-name="Standard">
      <style:paragraph-properties fo:text-align="justify" style:justify-single-word="false"/>
      <style:text-properties fo:font-weight="bold" officeooo:paragraph-rsid="00e8143e" style:font-weight-asian="bold" style:font-weight-complex="bold"/>
    </style:style>
    <style:style style:name="P23" style:family="paragraph" style:parent-style-name="Standard">
      <style:paragraph-properties fo:text-align="justify" style:justify-single-word="false"/>
      <style:text-properties officeooo:paragraph-rsid="00e8143e"/>
    </style:style>
    <style:style style:name="P24" style:family="paragraph" style:parent-style-name="Footnote">
      <style:paragraph-properties fo:margin-left="0cm" fo:text-indent="0cm" style:auto-text-indent="false"/>
      <style:text-properties officeooo:paragraph-rsid="00a5d764"/>
    </style:style>
    <style:style style:name="P25" style:family="paragraph" style:parent-style-name="Standard">
      <style:text-properties officeooo:paragraph-rsid="00e7c1a7"/>
    </style:style>
    <style:style style:name="P26" style:family="paragraph" style:parent-style-name="Standard">
      <style:paragraph-properties fo:margin-left="0cm" fo:margin-right="0cm" style:line-height-at-least="0.503cm" fo:text-indent="0cm" style:auto-text-indent="false"/>
      <style:text-properties fo:color="#3b3b3b" loext:opacity="100%" fo:background-color="#ffffff"/>
    </style:style>
    <style:style style:name="P27" style:family="paragraph" style:parent-style-name="Standard">
      <style:paragraph-properties fo:margin-left="0cm" fo:margin-right="0cm" style:line-height-at-least="0.503cm" fo:text-indent="0cm" style:auto-text-indent="false"/>
      <style:text-properties fo:color="#3b3b3b" loext:opacity="100%" style:font-name="Consolas" fo:font-size="10.5pt" fo:font-weight="normal" fo:background-color="#ffffff"/>
    </style:style>
    <style:style style:name="P28" style:family="paragraph" style:parent-style-name="Standard">
      <style:paragraph-properties style:line-height-at-least="0.503cm"/>
      <style:text-properties fo:color="#3b3b3b" loext:opacity="100%" style:font-name="Consolas" fo:font-size="10.5pt" fo:font-weight="normal" fo:background-color="#ffffff"/>
    </style:style>
    <style:style style:name="P29" style:family="paragraph" style:parent-style-name="Standard">
      <style:text-properties officeooo:rsid="00a8bc71" officeooo:paragraph-rsid="00a8bc71"/>
    </style:style>
    <style:style style:name="P30" style:family="paragraph" style:parent-style-name="Standard">
      <style:text-properties fo:color="#3b3b3b" loext:opacity="100%" style:font-name="Consolas" fo:font-size="10.5pt" fo:font-weight="normal" officeooo:paragraph-rsid="00a8bc71" fo:background-color="#ffffff"/>
    </style:style>
    <style:style style:name="P31" style:family="paragraph" style:parent-style-name="Standard">
      <style:text-properties fo:color="#3b3b3b" loext:opacity="100%" style:font-name="Consolas" fo:font-size="10.5pt" fo:font-weight="normal" officeooo:rsid="007efa12" officeooo:paragraph-rsid="0006d8d0" fo:background-color="#ffffff"/>
    </style:style>
    <style:style style:name="P32" style:family="paragraph" style:parent-style-name="Standard">
      <style:text-properties fo:font-weight="bold" officeooo:rsid="00b17fd7" officeooo:paragraph-rsid="00b17fd7" style:font-weight-asian="bold" style:font-weight-complex="bold"/>
    </style:style>
    <style:style style:name="P33" style:family="paragraph" style:parent-style-name="Standard">
      <style:text-properties officeooo:rsid="00b17fd7" officeooo:paragraph-rsid="00b17fd7"/>
    </style:style>
    <style:style style:name="P34" style:family="paragraph" style:parent-style-name="Standard">
      <style:paragraph-properties fo:text-align="justify" style:justify-single-word="false"/>
      <style:text-properties officeooo:rsid="00b37dc9" officeooo:paragraph-rsid="00b37dc9"/>
    </style:style>
    <style:style style:name="P35" style:family="paragraph" style:parent-style-name="Standard">
      <style:text-properties officeooo:rsid="00b37dc9" officeooo:paragraph-rsid="00b37dc9"/>
    </style:style>
    <style:style style:name="P36" style:family="paragraph" style:parent-style-name="Standard">
      <style:paragraph-properties fo:text-align="justify" style:justify-single-word="false"/>
      <style:text-properties officeooo:rsid="00bac10e" officeooo:paragraph-rsid="00bac10e"/>
    </style:style>
    <style:style style:name="P37" style:family="paragraph" style:parent-style-name="Standard">
      <style:text-properties officeooo:rsid="00bac10e" officeooo:paragraph-rsid="00bac10e"/>
    </style:style>
    <style:style style:name="P38" style:family="paragraph" style:parent-style-name="Standard">
      <style:text-properties fo:font-weight="bold" officeooo:rsid="00bd287b" officeooo:paragraph-rsid="00bd287b" style:font-weight-asian="bold" style:font-weight-complex="bold"/>
    </style:style>
    <style:style style:name="P39" style:family="paragraph" style:parent-style-name="Standard">
      <style:text-properties officeooo:rsid="00bd287b" officeooo:paragraph-rsid="00bd287b"/>
    </style:style>
    <style:style style:name="P40" style:family="paragraph" style:parent-style-name="Standard">
      <style:text-properties officeooo:rsid="00bd54a8" officeooo:paragraph-rsid="00bd54a8"/>
    </style:style>
    <style:style style:name="P41" style:family="paragraph" style:parent-style-name="Standard">
      <style:text-properties officeooo:rsid="00be2c2d" officeooo:paragraph-rsid="00be2c2d"/>
    </style:style>
    <style:style style:name="P42" style:family="paragraph" style:parent-style-name="Standard">
      <style:text-properties fo:font-weight="bold" officeooo:rsid="00c33f5c" officeooo:paragraph-rsid="00c33f5c" style:font-weight-asian="bold" style:font-weight-complex="bold"/>
    </style:style>
    <style:style style:name="P43" style:family="paragraph" style:parent-style-name="Standard">
      <style:text-properties officeooo:rsid="00c33f5c" officeooo:paragraph-rsid="00c33f5c"/>
    </style:style>
    <style:style style:name="P44" style:family="paragraph" style:parent-style-name="Standard">
      <style:text-properties fo:font-weight="bold" officeooo:rsid="00ca6cee" officeooo:paragraph-rsid="00ca6cee" style:font-weight-asian="bold" style:font-weight-complex="bold"/>
    </style:style>
    <style:style style:name="P45" style:family="paragraph" style:parent-style-name="Standard">
      <style:text-properties officeooo:rsid="00ca6cee" officeooo:paragraph-rsid="00ca6cee"/>
    </style:style>
    <style:style style:name="P46" style:family="paragraph" style:parent-style-name="Table_20_Contents">
      <style:text-properties fo:font-weight="bold" officeooo:rsid="00cfbdcf" officeooo:paragraph-rsid="00cfbdcf" style:font-weight-asian="bold" style:font-weight-complex="bold"/>
    </style:style>
    <style:style style:name="P47" style:family="paragraph" style:parent-style-name="Table_20_Contents">
      <style:text-properties fo:font-weight="normal" officeooo:rsid="00e28a2a" officeooo:paragraph-rsid="00e28a2a" style:font-weight-asian="normal" style:font-weight-complex="normal"/>
    </style:style>
    <style:style style:name="P48" style:family="paragraph" style:parent-style-name="Table_20_Contents">
      <style:text-properties fo:font-weight="normal" officeooo:rsid="00e311dc" officeooo:paragraph-rsid="00e311dc" style:font-weight-asian="normal" style:font-weight-complex="normal"/>
    </style:style>
    <style:style style:name="P49" style:family="paragraph" style:parent-style-name="Table_20_Contents">
      <style:text-properties officeooo:rsid="00d0a11c" officeooo:paragraph-rsid="00d0a11c"/>
    </style:style>
    <style:style style:name="P50" style:family="paragraph" style:parent-style-name="Table_20_Contents">
      <style:text-properties officeooo:rsid="00d10296" officeooo:paragraph-rsid="00d10296"/>
    </style:style>
    <style:style style:name="P51" style:family="paragraph" style:parent-style-name="Table_20_Contents">
      <style:text-properties officeooo:rsid="00d4297a" officeooo:paragraph-rsid="00d4297a"/>
    </style:style>
    <style:style style:name="P52" style:family="paragraph" style:parent-style-name="Table_20_Contents">
      <style:text-properties officeooo:rsid="00d44ed3" officeooo:paragraph-rsid="00d44ed3"/>
    </style:style>
    <style:style style:name="P53" style:family="paragraph" style:parent-style-name="Table_20_Contents">
      <style:text-properties officeooo:rsid="00d61634" officeooo:paragraph-rsid="00d61634"/>
    </style:style>
    <style:style style:name="P54" style:family="paragraph" style:parent-style-name="Table_20_Contents">
      <style:text-properties officeooo:rsid="00d804fa" officeooo:paragraph-rsid="00d804fa"/>
    </style:style>
    <style:style style:name="P55" style:family="paragraph" style:parent-style-name="Table_20_Contents">
      <style:text-properties officeooo:rsid="00d8c889" officeooo:paragraph-rsid="00d8c889"/>
    </style:style>
    <style:style style:name="P56" style:family="paragraph" style:parent-style-name="Table_20_Contents">
      <style:text-properties officeooo:rsid="00de57bf" officeooo:paragraph-rsid="00de57bf"/>
    </style:style>
    <style:style style:name="P57" style:family="paragraph" style:parent-style-name="Table_20_Contents">
      <style:text-properties officeooo:rsid="00e184ec" officeooo:paragraph-rsid="00e184ec"/>
    </style:style>
    <style:style style:name="P58" style:family="paragraph" style:parent-style-name="Table_20_Contents">
      <style:text-properties officeooo:rsid="00e235a4" officeooo:paragraph-rsid="00e235a4"/>
    </style:style>
    <style:style style:name="P59" style:family="paragraph" style:parent-style-name="Table_20_Contents">
      <style:text-properties officeooo:rsid="00e3f2db" officeooo:paragraph-rsid="00e3f2db"/>
    </style:style>
    <style:style style:name="P60" style:family="paragraph" style:parent-style-name="Standard">
      <style:paragraph-properties fo:text-align="justify" style:justify-single-word="false"/>
      <style:text-properties officeooo:rsid="00eb51b0" officeooo:paragraph-rsid="00eb51b0"/>
    </style:style>
    <style:style style:name="T1" style:family="text">
      <style:text-properties officeooo:rsid="008e237f"/>
    </style:style>
    <style:style style:name="T2" style:family="text">
      <style:text-properties officeooo:rsid="003e29e5"/>
    </style:style>
    <style:style style:name="T3" style:family="text">
      <style:text-properties officeooo:rsid="0095eb5e"/>
    </style:style>
    <style:style style:name="T4" style:family="text">
      <style:text-properties officeooo:rsid="007efa12"/>
    </style:style>
    <style:style style:name="T5" style:family="text">
      <style:text-properties officeooo:rsid="0096fa2b"/>
    </style:style>
    <style:style style:name="T6" style:family="text">
      <style:text-properties officeooo:rsid="0097f0e5"/>
    </style:style>
    <style:style style:name="T7" style:family="text">
      <style:text-properties officeooo:rsid="00995241"/>
    </style:style>
    <style:style style:name="T8" style:family="text">
      <style:text-properties officeooo:rsid="009a3486"/>
    </style:style>
    <style:style style:name="T9" style:family="text">
      <style:text-properties officeooo:rsid="009d2e3a"/>
    </style:style>
    <style:style style:name="T10" style:family="text">
      <style:text-properties officeooo:rsid="009bd736"/>
    </style:style>
    <style:style style:name="T11" style:family="text">
      <style:text-properties officeooo:rsid="00a1d04b"/>
    </style:style>
    <style:style style:name="T12" style:family="text">
      <style:text-properties officeooo:rsid="00a20a54"/>
    </style:style>
    <style:style style:name="T13" style:family="text">
      <style:text-properties officeooo:rsid="00a26994"/>
    </style:style>
    <style:style style:name="T14" style:family="text">
      <style:text-properties officeooo:rsid="00a30844"/>
    </style:style>
    <style:style style:name="T15" style:family="text">
      <style:text-properties officeooo:rsid="00a3626d"/>
    </style:style>
    <style:style style:name="T16" style:family="text">
      <style:text-properties officeooo:rsid="00a425f0"/>
    </style:style>
    <style:style style:name="T17" style:family="text">
      <style:text-properties officeooo:rsid="00a5d764"/>
    </style:style>
    <style:style style:name="T18" style:family="text">
      <style:text-properties officeooo:rsid="00a6cd93"/>
    </style:style>
    <style:style style:name="T19" style:family="text">
      <style:text-properties officeooo:rsid="00a8bc71"/>
    </style:style>
    <style:style style:name="T20" style:family="text">
      <style:text-properties fo:color="#3b3b3b" loext:opacity="100%" style:font-name="Consolas" fo:font-size="10.5pt" fo:font-weight="normal" fo:background-color="#ffffff" loext:char-shading-value="0"/>
    </style:style>
    <style:style style:name="T21" style:family="text">
      <style:text-properties fo:color="#0451a5" loext:opacity="100%" style:font-name="Consolas" fo:font-size="10.5pt" fo:font-weight="normal"/>
    </style:style>
    <style:style style:name="T22" style:family="text">
      <style:text-properties style:font-name="Consolas" fo:font-size="10.5pt" fo:font-weight="normal"/>
    </style:style>
    <style:style style:name="T23" style:family="text">
      <style:text-properties fo:color="#a31515" loext:opacity="100%" style:font-name="Consolas" fo:font-size="10.5pt" fo:font-weight="normal"/>
    </style:style>
    <style:style style:name="T24" style:family="text">
      <style:text-properties fo:color="#0451a5" loext:opacity="100%" style:font-name="Consolas" fo:font-size="10.5pt" fo:font-weight="normal" officeooo:rsid="00c5caa6"/>
    </style:style>
    <style:style style:name="T25" style:family="text">
      <style:text-properties fo:color="#098658" loext:opacity="100%" style:font-name="Consolas" fo:font-size="10.5pt" fo:font-weight="normal"/>
    </style:style>
    <style:style style:name="T26" style:family="text">
      <style:text-properties fo:color="#0451a5" loext:opacity="100%" style:font-name="Consolas" fo:font-size="10.5pt" fo:font-weight="normal" officeooo:rsid="00c6a953"/>
    </style:style>
    <style:style style:name="T27" style:family="text">
      <style:text-properties officeooo:rsid="00c7d0b6"/>
    </style:style>
    <style:style style:name="T28" style:family="text">
      <style:text-properties officeooo:rsid="00c8b502"/>
    </style:style>
    <style:style style:name="T29" style:family="text">
      <style:text-properties officeooo:rsid="00b4f71f"/>
    </style:style>
    <style:style style:name="T30" style:family="text">
      <style:text-properties officeooo:rsid="00b58356"/>
    </style:style>
    <style:style style:name="T31" style:family="text">
      <style:text-properties officeooo:rsid="00b634c3"/>
    </style:style>
    <style:style style:name="T32" style:family="text">
      <style:text-properties officeooo:rsid="00bd54a8"/>
    </style:style>
    <style:style style:name="T33" style:family="text">
      <style:text-properties officeooo:rsid="00bdcbc8"/>
    </style:style>
    <style:style style:name="T34" style:family="text">
      <style:text-properties officeooo:rsid="00be2c2d"/>
    </style:style>
    <style:style style:name="T35" style:family="text">
      <style:text-properties officeooo:rsid="00c4f9b2"/>
    </style:style>
    <style:style style:name="T36" style:family="text">
      <style:text-properties officeooo:rsid="00cdaa99"/>
    </style:style>
    <style:style style:name="T37" style:family="text">
      <style:text-properties officeooo:rsid="00cc936a"/>
    </style:style>
    <style:style style:name="T38" style:family="text">
      <style:text-properties officeooo:rsid="00cee6a2"/>
    </style:style>
    <style:style style:name="T39" style:family="text">
      <style:text-properties officeooo:rsid="00e0309a"/>
    </style:style>
    <style:style style:name="T40" style:family="text">
      <style:text-properties officeooo:rsid="00dc676c"/>
    </style:style>
    <style:style style:name="T41" style:family="text">
      <style:text-properties officeooo:rsid="00dac64a"/>
    </style:style>
    <style:style style:name="T42" style:family="text">
      <style:text-properties officeooo:rsid="00e09b12"/>
    </style:style>
    <style:style style:name="T43" style:family="text">
      <style:text-properties officeooo:rsid="00bd287b"/>
    </style:style>
    <style:style style:name="T44" style:family="text">
      <style:text-properties officeooo:rsid="00ebd2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TEC – Empresa de Tecnologias do Município de Juiz de Fo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Proposta de arquitetura para o projeto GRP</text:span><text:line-break/><text:line-break/><text:line-break/><text:line-break/><text:line-break/><text:line-break/><text:line-break/><text:line-break/><text:line-break/><text:line-break/><text:line-break/><text:line-break/><text:line-break/><text:line-break/></text:p>
      <text:p text:style-name="P4">Marcelo Palacio Abreu – Analista de sistemas II, Arquiteto de soluções<text:line-break/>Bacharel em Sistemas de Informação, Graduando em Direito e Contabilidade, <text:span text:style-name="T2">Especialista em Projetos de Computação em Nuvem</text:span></text:p>
      <text:p text:style-name="P5"/>
      <text:p text:style-name="P5"/>
      <text:p text:style-name="P6">1 - Introdução</text:p>
      <text:p text:style-name="P7"/>
      <text:p text:style-name="P8">A estratégia da EMTEC é desenvolver o GRP na forma de um conjunto de módulos interdependentes. Porém a experiência com sistemas herdados como SIFAN, demonstram que o software utilizado na PJF tem ciclo de vida de décadas. Portanto é necessário estabelecer uma arquitetura compatível com essa característica. Promovendo facilidade de desenvolvimento e manutenção em equipes de tamanho variável<text:note text:id="ftn0" text:note-class="footnote"><text:note-citation>1</text:note-citation><text:note-body><text:p text:style-name="P9"><text:s/>- Desenvolver “só” não pode ser um problema. Assim como desenvolver em um ou múltiplos esquadrões também não. Deve ser possível fazer alterações concentradas sem regredir outras partes da aplicação por impactos arquiteturais ou débito técnico. Por exemplo, quando as regras de negócio estão distribuídas nos controladores de API, então quando se altera a lógica em uma rota é necessário buscar manualmente os impactos. Portanto é impossível fazer uma alteração e garantir que a próxima versão esteja pronta para uso. Essa situação piora mais quando o número de módulos aumenta.</text:p></text:note-body></text:note>, baixo acoplamento, independência da tecnologia de banco de dados e da interface gráfica.</text:p>
      <text:p text:style-name="P7"/>
      <text:p text:style-name="P10">2 - A arquitetura</text:p>
      <text:p text:style-name="P7"/>
      <text:p text:style-name="P10">2.1 - Persistência</text:p>
      <text:p text:style-name="P7"/>
      <text:p text:style-name="P8">A persistência deve ser desacoplada do restante do software e cumprir função única: Permitir o controle das informações na base de dados. Porém existem inúmeros SGBDs e inúmeras tecnologias de persistência. Portanto, a aplicação deve dispor de uma camada de aplicação, preferencialmente intermediada for bibliotecas especialistas em persistência e apoiadas sobre uma arquitetura que permita substituir toda a implementação conforme a necessidade. O fluxo a seguir demonstra o funcionamento de um pacote de persistência que torna a aplicação independente da tecnologia utilizada, onde a implementação o contrato do repositório de dados expõe os métodos necessários a toda a aplicação, possibilitando mudar a tecnologia de persistência sobrescrevendo a implementação.</text:p>
      <text:p text:style-name="P7"/>
      <text:p text:style-name="P7"><text:span text:style-name="T3">(1) </text:span>BANCO DE DADOS → <text:span text:style-name="T3">(2) </text:span>BIBLIOTECA DE PERSISTÊNCIA → <text:span text:style-name="T3">(3) </text:span>IMPLEMENTAÇÃO DA PERSISTÊNCIA → <text:span text:style-name="T3">(4) </text:span>CONTRATO DA PERSISTÊNCIA → <text:span text:style-name="T3">(5) </text:span>OPERAÇÕES DISPONÍVEIS</text:p>
      <text:p text:style-name="P7"/>
      <text:p text:style-name="P10">2.2 - Regras de negócio</text:p>
      <text:p text:style-name="P7"/>
      <text:p text:style-name="P8">As regras de negócio, em geral devem ser fortemente hierarquizadas<text:note text:id="ftn1" text:note-class="footnote"><text:note-citation>2</text:note-citation><text:note-body><text:p text:style-name="P11"><text:s/>- <text:span text:style-name="T4">A hierarquização permite definir tantos graus de responsabilidade quanto o modelo demande. Por exemplo: Serviços de domínio <text:s/>queles que definem operações atômicas e básicas sobre uma determinada classe. Serviços de orquestração, os que orquestram fluxos inteiros, demandando alto </text:span><text:span text:style-name="T5">nível de </text:span><text:span text:style-name="T4">controle sobre transações e garantias de estado. Como acontece na operação hipotética de transferência de saldo: verifica a fonte, subtrai da fonte soma no destino confirma a operação, serviços vinculados, são uma exceção a regra, aqueles que inevitavelmente tocam a implementação técnica, nesse caso, o ideal é manter apenas a interface e delegar a implementação para a aplicação que consumir o pacote.</text:span></text:p></text:note-body></text:note>[2], independentes de tecnologia e desacopladas. Isso garante que a análise dependa apenas da interpretação de código básico, facilitando uma futura sobrescrita evita a contaminação com tipos de outras camadas e impede problemas básicos de projeto.</text:p>
      <text:p text:style-name="P8"/>
      <text:p text:style-name="P12">2.3 - Interface de comunicação e de usuário</text:p>
      <text:p text:style-name="P8"/>
      <text:p text:style-name="P8">Aplicações verdadeiramente resilientes, desacopladas e <text:span text:style-name="T6">criteriosamente</text:span> arquitetadas dispõe de metadados para definição de suas extremidades, interfaces e fluxos, permitindo inclusive a alteração do invólucro e de toda a camada de interface através da simples substituição. Por exemplo, ao desenvolver uma aplicação foram definidas todas as rotas, controles, ações e permissões em uma <text:soft-page-break/>especificação própria, portanto, é possível interpretar essas informações e gerar a estrutura do involucro que executará a retaguarda.</text:p>
      <text:p text:style-name="P8"/>
      <text:p text:style-name="P8">Da mesma forma, as telas utilizadas para interação e os fluxos foram definidos em arquivos de metadados intermediários, então para criar suporte a uma nova plataforma, ou até mesmo atualizar a tecnologia de exibição de acordo com os padrões mais recentes.</text:p>
      <text:p text:style-name="P7"/>
      <text:p text:style-name="P13">3 – Proposta</text:p>
      <text:p text:style-name="P14"/>
      <text:p text:style-name="P15"><text:span text:style-name="T7">Para o atendimento das características apresentadas e o maior nível de independência propõe-se construir o projeto sobre </text:span>a linguagem Csharp executada sobre o .NET Core para desenvolver os projetos de entidades, <text:span text:style-name="T7">persistência, repositórios, serviços, e invólucro (nesse caso o projeto de API).<text:line-break/></text:span></text:p>
      <text:p text:style-name="P16">3.1 – A plataforma .NET Core</text:p>
      <text:p text:style-name="P15"><text:span text:style-name="T7"><text:line-break/>A plataforma suporta múltiplas plataformas, possibilitando a escolha e até mudanças no decorrer do tempo. Também observa-se alto nível de compatibilidade com a computação paralela através da abstração de instruções SIMD</text:span><text:span text:style-name="T7"><text:note text:id="ftn2" text:note-class="footnote"><text:note-citation>3</text:note-citation><text:note-body><text:p text:style-name="P17"><text:s/>- <text:span text:style-name="T8">São instruções para processamento de informações vetoriais amplamente disponíveis na arquitetura x86. Por exemplo: SSE, SSE2 e AVX.</text:span></text:p></text:note-body></text:note></text:span><text:span text:style-name="T7">. A interface “Vector” por exemplo abstrai o processamento de matrizes em paralelo, tornando operações de computação massiva mais rápidas, </text:span><text:span text:style-name="T9">na casa das centenas de vezes</text:span><text:span text:style-name="T7">. </text:span><text:span text:style-name="T10">Outras linguagens costumam depender de bibliotecas ou até, módulos compilados para binário nativo.</text:span></text:p>
      <text:p text:style-name="P18"/>
      <text:p text:style-name="P19">3.2 – Persistência</text:p>
      <text:p text:style-name="P20"/>
      <text:p text:style-name="P21">A persistência será mediada pelo Entity Framework. Uma base de código que por si só possibilita a utilização de SGBDs relacionais e não relacionais, como: MySQL, SQL Server, Postgresql, MongoDB, etc… <text:span text:style-name="T11">Além de dispor do LINQ, uma linguagem de pesquisa intermediária, </text:span><text:span text:style-name="T12">avaliada em tempo de compilação e imutável. </text:span><text:span text:style-name="T13">A flexibilidade e resiliência entregues somadas aos benefícios da adoção dos padrões corretos tornam a aplicação “imune” a variações tecnológicas de persistência.</text:span></text:p>
      <text:p text:style-name="P20"/>
      <text:p text:style-name="P22"><text:span text:style-name="T13">3.3 – </text:span><text:span text:style-name="T14">Interface de usuário.</text:span></text:p>
      <text:p text:style-name="P23"><text:span text:style-name="T14"><text:line-break/>A principal preocupação no momento de projetar interfaces de usuário em projetos de grande dimensão é a </text:span><text:span text:style-name="T15">transitoriedade das tecnologias de interface. </text:span><text:span text:style-name="T16">A estratégia para tratamento desse problema foi a utilização de arquivos de metadados que definem layout e comportamentos da aplicação para as telas generalizáveis e o desenvolvimento da base mínima para suportar operações específicas. O benefício óbvio é reduzir o volume de código específico e viabilizar a atualização constante dos projetos de interface adicionando apenas mais um passo ao processo de desenvolvimento</text:span><text:span text:style-name="T16"><text:note text:id="ftn3" text:note-class="footnote"><text:note-citation>4</text:note-citation><text:note-body><text:p text:style-name="P24"><text:s/>- <text:span text:style-name="T17">Se anteriormente seriam desenvolvidas: as páginas públicas, de autenticação e cada uma das outras telas de pesquisa e cadastro. A gora, devido a abordagem apresentada serão desenvolvidas: as páginas públicas, de autenticação e o processador de metadados. O processador de metadados construirá a interface de todas as telas generalizáveis.</text:span></text:p></text:note-body></text:note></text:span><text:span text:style-name="T16">. </text:span><text:span text:style-name="T18">Os metadados de telas e rotas de aplicação podem ser tão simples como segue:</text:span></text:p>
      <text:p text:style-name="P25"><text:span text:style-name="T18"><text:line-break/></text:span><text:span text:style-name="T19">O arquivo que dará origem ao menu principal e a tela de gestão de perfis:<text:line-break/><text:line-break/></text:span><text:span text:style-name="T20">{</text:span></text:p>
      <text:p text:style-name="P26">  <text:span text:style-name="T21">"modulos"</text:span><text:span text:style-name="T22">: [</text:span></text:p>
      <text:p text:style-name="P26">    <text:span text:style-name="T22">{</text:span></text:p>
      <text:p text:style-name="P26">      <text:span text:style-name="T21">"group"</text:span><text:span text:style-name="T22">: </text:span><text:span text:style-name="T23">"Administração"</text:span><text:span text:style-name="T22">,</text:span></text:p>
      <text:p text:style-name="P26">      <text:span text:style-name="T21">"items"</text:span><text:span text:style-name="T22">: [</text:span></text:p>
      <text:p text:style-name="P26"><text:soft-page-break/>        <text:span text:style-name="T22">{ </text:span><text:span text:style-name="T21">"key"</text:span><text:span text:style-name="T22">: </text:span><text:span text:style-name="T23">"organizacoes"</text:span><text:span text:style-name="T22">, </text:span><text:span text:style-name="T21">"label"</text:span><text:span text:style-name="T22">: </text:span><text:span text:style-name="T23">"Organizações"</text:span><text:span text:style-name="T22">, </text:span><text:span text:style-name="T21">"icon"</text:span><text:span text:style-name="T22">: </text:span><text:span text:style-name="T23">"business"</text:span><text:span text:style-name="T22">, </text:span><text:span text:style-name="T21">"url"</text:span><text:span text:style-name="T22">: </text:span><text:span text:style-name="T23">"/painel/organizacoes"</text:span><text:span text:style-name="T22">, </text:span><text:span text:style-name="T21">"permissoes"</text:span><text:span text:style-name="T22">: [</text:span></text:p>
      <text:p text:style-name="P26">                    <text:span text:style-name="T22">{ </text:span><text:span text:style-name="T21">"id"</text:span><text:span text:style-name="T22">: </text:span><text:span text:style-name="T23">"organizacoes.visualizar"</text:span><text:span text:style-name="T22">, </text:span><text:span text:style-name="T21">"label"</text:span><text:span text:style-name="T22">: </text:span><text:span text:style-name="T23">"Visualizar"</text:span><text:span text:style-name="T22"> },</text:span></text:p>
      <text:p text:style-name="P26">                    <text:span text:style-name="T22">{ </text:span><text:span text:style-name="T21">"id"</text:span><text:span text:style-name="T22">: </text:span><text:span text:style-name="T23">"organizacoes.editar"</text:span><text:span text:style-name="T22">, </text:span><text:span text:style-name="T21">"label"</text:span><text:span text:style-name="T22">: </text:span><text:span text:style-name="T23">"Criar/Editar"</text:span><text:span text:style-name="T22"> },</text:span></text:p>
      <text:p text:style-name="P26">                    <text:span text:style-name="T22">{ </text:span><text:span text:style-name="T21">"id"</text:span><text:span text:style-name="T22">: </text:span><text:span text:style-name="T23">"organizacoes.excluir"</text:span><text:span text:style-name="T22">, </text:span><text:span text:style-name="T21">"label"</text:span><text:span text:style-name="T22">: </text:span><text:span text:style-name="T23">"Excluir"</text:span><text:span text:style-name="T22"> }</text:span></text:p>
      <text:p text:style-name="P26">                <text:span text:style-name="T22">] }</text:span></text:p>
      <text:p text:style-name="P26">      <text:span text:style-name="T22">]</text:span></text:p>
      <text:p text:style-name="P26">    <text:span text:style-name="T22">}</text:span></text:p>
      <text:p text:style-name="P26">  <text:span text:style-name="T22">]</text:span></text:p>
      <text:p text:style-name="P27">}</text:p>
      <text:p text:style-name="P28"/>
      <text:p text:style-name="P29">O arquivo que dará origem a uma tela de pesquisa:</text:p>
      <text:p text:style-name="P29"/>
      <text:p text:style-name="P30">{</text:p>
      <text:p text:style-name="P26">  <text:span text:style-name="T21">"</text:span><text:span text:style-name="T24">tela</text:span><text:span text:style-name="T21">"</text:span><text:span text:style-name="T22">: {</text:span></text:p>
      <text:p text:style-name="P26">    <text:span text:style-name="T21">"titulo"</text:span><text:span text:style-name="T22">: </text:span><text:span text:style-name="T23">"Organizações"</text:span><text:span text:style-name="T22">,</text:span></text:p>
      <text:p text:style-name="P26">    <text:span text:style-name="T21">"filtro"</text:span><text:span text:style-name="T22">: [</text:span></text:p>
      <text:p text:style-name="P26">      <text:span text:style-name="T22">{ </text:span><text:span text:style-name="T21">"campo"</text:span><text:span text:style-name="T22">: </text:span><text:span text:style-name="T23">"codigo"</text:span><text:span text:style-name="T22">, </text:span><text:span text:style-name="T21">"descricao"</text:span><text:span text:style-name="T22">: </text:span><text:span text:style-name="T23">"Código"</text:span><text:span text:style-name="T22">, </text:span><text:span text:style-name="T21">"tipo"</text:span><text:span text:style-name="T22">: </text:span><text:span text:style-name="T23">"string"</text:span><text:span text:style-name="T22">, </text:span><text:span text:style-name="T21">"col"</text:span><text:span text:style-name="T22">: </text:span><text:span text:style-name="T25">3</text:span><text:span text:style-name="T22"> },</text:span></text:p>
      <text:p text:style-name="P26">      <text:span text:style-name="T22">{ </text:span><text:span text:style-name="T21">"campo"</text:span><text:span text:style-name="T22">: </text:span><text:span text:style-name="T23">"nome"</text:span><text:span text:style-name="T22">, </text:span><text:span text:style-name="T21">"descricao"</text:span><text:span text:style-name="T22">: </text:span><text:span text:style-name="T23">"Nome"</text:span><text:span text:style-name="T22">, </text:span><text:span text:style-name="T21">"tipo"</text:span><text:span text:style-name="T22">: </text:span><text:span text:style-name="T23">"string"</text:span><text:span text:style-name="T22">, </text:span><text:span text:style-name="T21">"col"</text:span><text:span text:style-name="T22">: </text:span><text:span text:style-name="T25">3</text:span><text:span text:style-name="T22"> },</text:span></text:p>
      <text:p text:style-name="P26">      <text:span text:style-name="T22">{ </text:span><text:span text:style-name="T21">"campo"</text:span><text:span text:style-name="T22">: </text:span><text:span text:style-name="T23">"descricao"</text:span><text:span text:style-name="T22">, </text:span><text:span text:style-name="T21">"descricao"</text:span><text:span text:style-name="T22">: </text:span><text:span text:style-name="T23">"Descrição"</text:span><text:span text:style-name="T22">, </text:span><text:span text:style-name="T21">"tipo"</text:span><text:span text:style-name="T22">: </text:span><text:span text:style-name="T23">"string"</text:span><text:span text:style-name="T22">, </text:span><text:span text:style-name="T21">"col"</text:span><text:span text:style-name="T22">: </text:span><text:span text:style-name="T25">3</text:span><text:span text:style-name="T22"> },</text:span></text:p>
      <text:p text:style-name="P26">      <text:span text:style-name="T22">{ </text:span><text:span text:style-name="T21">"campo"</text:span><text:span text:style-name="T22">: </text:span><text:span text:style-name="T23">"created_at"</text:span><text:span text:style-name="T22">, </text:span><text:span text:style-name="T21">"descricao"</text:span><text:span text:style-name="T22">: </text:span><text:span text:style-name="T23">"Criado em"</text:span><text:span text:style-name="T22">, </text:span><text:span text:style-name="T21">"tipo"</text:span><text:span text:style-name="T22">: </text:span><text:span text:style-name="T23">"date"</text:span><text:span text:style-name="T22">, </text:span><text:span text:style-name="T21">"col"</text:span><text:span text:style-name="T22">: </text:span><text:span text:style-name="T25">3</text:span><text:span text:style-name="T22"> }</text:span></text:p>
      <text:p text:style-name="P26">    <text:span text:style-name="T22">],</text:span></text:p>
      <text:p text:style-name="P26">    <text:span text:style-name="T21">"tabela"</text:span><text:span text:style-name="T22">: {</text:span></text:p>
      <text:p text:style-name="P26">      <text:span text:style-name="T21">"colunas"</text:span><text:span text:style-name="T22">: [</text:span></text:p>
      <text:p text:style-name="P26">        <text:span text:style-name="T22">{ </text:span><text:span text:style-name="T21">"campo"</text:span><text:span text:style-name="T22">: </text:span><text:span text:style-name="T23">"codigo"</text:span><text:span text:style-name="T22">, </text:span><text:span text:style-name="T21">"titulo"</text:span><text:span text:style-name="T22">: </text:span><text:span text:style-name="T23">"Código"</text:span><text:span text:style-name="T22"> },</text:span></text:p>
      <text:p text:style-name="P26">        <text:span text:style-name="T22">{ </text:span><text:span text:style-name="T21">"campo"</text:span><text:span text:style-name="T22">: </text:span><text:span text:style-name="T23">"nome"</text:span><text:span text:style-name="T22">, </text:span><text:span text:style-name="T21">"titulo"</text:span><text:span text:style-name="T22">: </text:span><text:span text:style-name="T23">"Nome"</text:span><text:span text:style-name="T22"> },</text:span></text:p>
      <text:p text:style-name="P26">        <text:span text:style-name="T22">{ </text:span><text:span text:style-name="T21">"campo"</text:span><text:span text:style-name="T22">: </text:span><text:span text:style-name="T23">"descricao"</text:span><text:span text:style-name="T22">, </text:span><text:span text:style-name="T21">"titulo"</text:span><text:span text:style-name="T22">: </text:span><text:span text:style-name="T23">"Descrição"</text:span><text:span text:style-name="T22"> },</text:span></text:p>
      <text:p text:style-name="P26">        <text:span text:style-name="T22">{ </text:span><text:span text:style-name="T21">"campo"</text:span><text:span text:style-name="T22">: </text:span><text:span text:style-name="T23">"created_at"</text:span><text:span text:style-name="T22">, </text:span><text:span text:style-name="T21">"titulo"</text:span><text:span text:style-name="T22">: </text:span><text:span text:style-name="T23">"Criado em"</text:span><text:span text:style-name="T22"> }</text:span></text:p>
      <text:p text:style-name="P26">      <text:span text:style-name="T22">],</text:span></text:p>
      <text:p text:style-name="P26">      <text:span text:style-name="T21">"campos"</text:span><text:span text:style-name="T22">: [</text:span><text:span text:style-name="T23">"codigo"</text:span><text:span text:style-name="T22">, </text:span><text:span text:style-name="T23">"nome"</text:span><text:span text:style-name="T22">, </text:span><text:span text:style-name="T23">"descricao"</text:span><text:span text:style-name="T22">, </text:span><text:span text:style-name="T23">"created_at"</text:span><text:span text:style-name="T22">],</text:span></text:p>
      <text:p text:style-name="P26">      <text:span text:style-name="T21">"acoes"</text:span><text:span text:style-name="T22">: [</text:span></text:p>
      <text:p text:style-name="P26">        <text:span text:style-name="T22">{ </text:span><text:span text:style-name="T21">"tipo"</text:span><text:span text:style-name="T22">: </text:span><text:span text:style-name="T23">"navegacao"</text:span><text:span text:style-name="T22">, </text:span><text:span text:style-name="T21">"destino"</text:span><text:span text:style-name="T22">: </text:span><text:span text:style-name="T23">"/painel/organizacoes/editar/{id}"</text:span><text:span text:style-name="T22">, </text:span><text:span text:style-name="T21">"campo_id"</text:span><text:span text:style-name="T22">: </text:span><text:span text:style-name="T23">"id"</text:span><text:span text:style-name="T22">, </text:span><text:span text:style-name="T21">"icone"</text:span><text:span text:style-name="T22">: </text:span><text:span text:style-name="T23">"pencil"</text:span><text:span text:style-name="T22"> },</text:span></text:p>
      <text:p text:style-name="P26">        <text:span text:style-name="T22">{ </text:span><text:span text:style-name="T21">"tipo"</text:span><text:span text:style-name="T22">: </text:span><text:span text:style-name="T23">"confirmacao_delete_ajax"</text:span><text:span text:style-name="T22">, </text:span><text:span text:style-name="T21">"destino"</text:span><text:span text:style-name="T22">: </text:span><text:span text:style-name="T23">"/api/organizacoes/{id}"</text:span><text:span text:style-name="T22">, </text:span><text:span text:style-name="T21">"campo_id"</text:span><text:span text:style-name="T22">: </text:span><text:span text:style-name="T23">"id"</text:span><text:span text:style-name="T22">, </text:span><text:span text:style-name="T21">"icone"</text:span><text:span text:style-name="T22">: </text:span><text:span text:style-name="T23">"trash"</text:span><text:span text:style-name="T22"> }</text:span></text:p>
      <text:p text:style-name="P26">      <text:span text:style-name="T22">]</text:span></text:p>
      <text:p text:style-name="P26">    <text:span text:style-name="T22">},</text:span></text:p>
      <text:p text:style-name="P26">    <text:span text:style-name="T21">"pagination"</text:span><text:span text:style-name="T22">: { </text:span><text:span text:style-name="T21">"pageSize"</text:span><text:span text:style-name="T22">: </text:span><text:span text:style-name="T25">10</text:span><text:span text:style-name="T22"> }</text:span></text:p>
      <text:p text:style-name="P26">  <text:span text:style-name="T22">}</text:span></text:p>
      <text:p text:style-name="P27">}</text:p>
      <text:p text:style-name="P29"/>
      <text:p text:style-name="P29">O arquivo que dará origem a uma tela de cadastro:</text:p>
      <text:p text:style-name="P7"/>
      <text:p text:style-name="P31">{</text:p>
      <text:p text:style-name="P26">  <text:span text:style-name="T21">"</text:span><text:span text:style-name="T26">tela</text:span><text:span text:style-name="T21">"</text:span><text:span text:style-name="T22">: {</text:span></text:p>
      <text:p text:style-name="P26">    <text:span text:style-name="T21">"titulo"</text:span><text:span text:style-name="T22">: </text:span><text:span text:style-name="T23">"Cadastro de Organização"</text:span><text:span text:style-name="T22">,</text:span></text:p>
      <text:p text:style-name="P26">    <text:span text:style-name="T21">"campos"</text:span><text:span text:style-name="T22">: [</text:span></text:p>
      <text:p text:style-name="P26">      <text:span text:style-name="T22">{ </text:span><text:span text:style-name="T21">"campo"</text:span><text:span text:style-name="T22">: </text:span><text:span text:style-name="T23">"codigo"</text:span><text:span text:style-name="T22">, </text:span><text:span text:style-name="T21">"label"</text:span><text:span text:style-name="T22">: </text:span><text:span text:style-name="T23">"Código"</text:span><text:span text:style-name="T22">, </text:span><text:span text:style-name="T21">"tipo"</text:span><text:span text:style-name="T22">: </text:span><text:span text:style-name="T23">"text"</text:span><text:span text:style-name="T22">, </text:span><text:span text:style-name="T21">"col"</text:span><text:span text:style-name="T22">: </text:span><text:span text:style-name="T25">6</text:span><text:span text:style-name="T22"> },</text:span></text:p>
      <text:p text:style-name="P26">      <text:span text:style-name="T22">{ </text:span><text:span text:style-name="T21">"campo"</text:span><text:span text:style-name="T22">: </text:span><text:span text:style-name="T23">"nome"</text:span><text:span text:style-name="T22">, </text:span><text:span text:style-name="T21">"label"</text:span><text:span text:style-name="T22">: </text:span><text:span text:style-name="T23">"Nome da organização"</text:span><text:span text:style-name="T22">, </text:span><text:span text:style-name="T21">"tipo"</text:span><text:span text:style-name="T22">: </text:span><text:span text:style-name="T23">"text"</text:span><text:span text:style-name="T22">, </text:span><text:span text:style-name="T21">"col"</text:span><text:span text:style-name="T22">: </text:span><text:span text:style-name="T25">6</text:span><text:span text:style-name="T22"> },</text:span></text:p>
      <text:p text:style-name="P26">      <text:span text:style-name="T22">{ </text:span><text:span text:style-name="T21">"campo"</text:span><text:span text:style-name="T22">: </text:span><text:span text:style-name="T23">"descricao"</text:span><text:span text:style-name="T22">, </text:span><text:span text:style-name="T21">"label"</text:span><text:span text:style-name="T22">: </text:span><text:span text:style-name="T23">"Descrição"</text:span><text:span text:style-name="T22">, </text:span><text:span text:style-name="T21">"tipo"</text:span><text:span text:style-name="T22">: </text:span><text:span text:style-name="T23">"text"</text:span><text:span text:style-name="T22">, </text:span><text:span text:style-name="T21">"col"</text:span><text:span text:style-name="T22">: </text:span><text:span text:style-name="T25">6</text:span><text:span text:style-name="T22"> }</text:span></text:p>
      <text:p text:style-name="P26">    <text:span text:style-name="T22">]</text:span></text:p>
      <text:p text:style-name="P26"><text:soft-page-break/>  <text:span text:style-name="T22">}</text:span></text:p>
      <text:p text:style-name="P27">}</text:p>
      <text:p text:style-name="P7"/>
      <text:p text:style-name="P32">3.4 – Utilização de modelos de inteligência artificial</text:p>
      <text:p text:style-name="P33"/>
      <text:p text:style-name="P34">Os benefícios arquiteturais do ecossistema apresentado, superam outros <text:span text:style-name="T27">em </text:span><text:span text:style-name="T28">recursos básicos de engenharia</text:span>, isso também é verdade quado fala-se em inteligência artificial. <text:span text:style-name="T29">É possível executar modelos treinados em bibliotecas maduras do Python através da exportação para ONNX Runtime, quando se fala de modelos em geral </text:span><text:span text:style-name="T30">ou</text:span><text:span text:style-name="T29"> LlamaSharp </text:span><text:span text:style-name="T31">para LLMs</text:span><text:span text:style-name="T29"> no formato GGUF. Em última instância APIs e modularização de tarefas específicas viabilizam casos de uso ainda mais específicos.</text:span></text:p>
      <text:p text:style-name="P35"/>
      <text:p text:style-name="P36">É pertinente estar preparado para executar inteligência artificial e a utilização de bibliotecas viabiliza a criação de trabalhos em segundo plano para essa finalidade. Porém no geral, devido ao alto poder computacional demandado, essas funcionalidades são alcançadas consumindo APIs. E isso no ecossistema proposto é trivial.</text:p>
      <text:p text:style-name="P37"/>
      <text:p text:style-name="P38">3.5 – Visão geral da <text:span text:style-name="T32">arquitetura da</text:span> aplicação</text:p>
      <text:p text:style-name="P39"/>
      <text:p text:style-name="P40">O diagrama a seguir mostra a visão geral da a<text:span text:style-name="T33">rquitetura da aplicação: </text:span><text:s/></text:p>
      <text:p text:style-name="P40"/>
      <text:p text:style-name="P40"><text:a xlink:type="simple" xlink:href="https://drive.google.com/file/d/1q0fbScuMdeSsJeT86lWW8SlKArgHQO9O/view?usp=sharing" text:style-name="Internet_20_link" text:visited-style-name="Visited_20_Internet_20_Link">https://drive.google.com/file/d/1q0fbScuMdeSsJeT86lWW8SlKArgHQO9O/view?usp=sharing</text:a></text:p>
      <text:p text:style-name="P40"/>
      <text:p text:style-name="P40"><draw:frame draw:style-name="fr1" draw:name="Figura1" text:anchor-type="char" svg:width="17cm" svg:height="9.146cm" draw:z-index="0"><draw:image xlink:href="Pictures/1000000100000C84000006BC5C240520.png" xlink:type="simple" xlink:show="embed" xlink:actuate="onLoad" draw:mime-type="image/png"/></draw:frame></text:p>
      <text:p text:style-name="P40"/>
      <text:p text:style-name="P39"/>
      <text:p text:style-name="P38">3.6 – Visão geral da <text:span text:style-name="T34">arquitetura da </text:span>solução:</text:p>
      <text:p text:style-name="P39"/>
      <text:p text:style-name="P41">O diagrama a seguir mostra a visão geral da arquitetura da solução:</text:p>
      <text:p text:style-name="P41"/>
      <text:p text:style-name="P41"><text:a xlink:type="simple" xlink:href="https://drive.google.com/file/d/1r4Q306-yd1DQuFESYu4_6uhv-wf2vX6X/view?usp=sharing" text:style-name="Internet_20_link" text:visited-style-name="Visited_20_Internet_20_Link">https://drive.google.com/file/d/1r4Q306-yd1DQuFESYu4_6uhv-wf2vX6X/view?usp=sharing</text:a></text:p>
      <text:p text:style-name="P41"/>
      <text:p text:style-name="P41"><draw:frame draw:style-name="fr1" draw:name="Figura2" text:anchor-type="char" svg:width="17cm" svg:height="14.785cm" draw:z-index="1"><draw:image xlink:href="Pictures/1000000100000C5C00000AC0FB319AB2.png" xlink:type="simple" xlink:show="embed" xlink:actuate="onLoad" draw:mime-type="image/png"/></draw:frame><text:soft-page-break/></text:p>
      <text:p text:style-name="P42">3.7 – <text:span text:style-name="T35">Repositório da prova de conceito</text:span></text:p>
      <text:p text:style-name="P43"/>
      <text:p text:style-name="P43"><text:a xlink:type="simple" xlink:href="https://github.com/marcelopalacioabreu/proposta_arquitetura_grp" text:style-name="Internet_20_link" text:visited-style-name="Visited_20_Internet_20_Link">https://github.com/marcelopalacioabreu/proposta_arquitetura_grp</text:a></text:p>
      <text:p text:style-name="P43"/>
      <text:p text:style-name="P44">3.8 – <text:span text:style-name="T36">Quadro</text:span> dos <text:span text:style-name="T37">requisitos </text:span><text:span text:style-name="T38">arquiteturais</text:span> e <text:span text:style-name="T37">soluções propostas</text:span></text:p>
      <text:p text:style-name="P45"/>
      <table:table table:name="Tabela1" table:style-name="Tabela1">
        <table:table-column table:style-name="Tabela1.A" table:number-columns-repeated="2"/>
        <table:table-row>
          <table:table-cell table:style-name="Tabela1.A1" office:value-type="string">
            <text:p text:style-name="P46">Requisito</text:p>
          </table:table-cell>
          <table:table-cell table:style-name="Tabela1.A1" office:value-type="string">
            <text:p text:style-name="P46">Solução</text:p>
          </table:table-cell>
        </table:table-row>
        <table:table-row>
          <table:table-cell table:style-name="Tabela1.A1" office:value-type="string">
            <text:p text:style-name="P47">Ambiente multiplataforma e confiável</text:p>
          </table:table-cell>
          <table:table-cell table:style-name="Tabela1.A1" office:value-type="string">
            <text:p text:style-name="P48">Adoção do .NET Core. Suporte a múltiplas plataformas e disposição de recursos avançados como SIMD, SSE, SSE2, AVX2 através de classes da biblioteca padrão.</text:p>
          </table:table-cell>
        </table:table-row>
        <table:table-row>
          <table:table-cell table:style-name="Tabela1.A1" office:value-type="string">
            <text:p text:style-name="P49"><text:span text:style-name="T39">Independência</text:span> da tecnologia de SGBD e linguagem de pesquisa</text:p>
          </table:table-cell>
          <table:table-cell table:style-name="Tabela1.A1" office:value-type="string">
            <text:p text:style-name="P50">Entity Framework – Suporte a SGBDs relacionais e não relacionais. Entre eles: Mysql, SQLServer, Postgresql, MongoDB.</text:p>
          </table:table-cell>
        </table:table-row>
        <table:table-row>
          <table:table-cell table:style-name="Tabela1.A1" office:value-type="string">
            <text:p text:style-name="P51"><text:span text:style-name="T39">Desacoplamento</text:span> da persistência <text:span text:style-name="T39">da</text:span> biblioteca de intermediação</text:p>
          </table:table-cell>
          <table:table-cell table:style-name="Tabela1.A1" office:value-type="string">
            <text:p text:style-name="P51">Utilização do padrão de repositórios, possibilitando inclusive a mudança da estratégia de persistência alterando apenas a implementação.</text:p>
          </table:table-cell>
        </table:table-row>
        <text:soft-page-break/>
        <table:table-row>
          <table:table-cell table:style-name="Tabela1.A1" office:value-type="string">
            <text:p text:style-name="P52">Suporte nativo a execução de modelos de inteligência artificial</text:p>
          </table:table-cell>
          <table:table-cell table:style-name="Tabela1.A1" office:value-type="string">
            <text:p text:style-name="P52">Uso de bibliotecas como ONNX Framework e Llama Sharp.</text:p>
          </table:table-cell>
        </table:table-row>
        <table:table-row>
          <table:table-cell table:style-name="Tabela1.A1" office:value-type="string">
            <text:p text:style-name="P53">Integração com APIs de inteligência artificial</text:p>
          </table:table-cell>
          <table:table-cell table:style-name="Tabela1.A1" office:value-type="string">
            <text:p text:style-name="P53">Trivial. Através de cliente http ou sdk do provedor.</text:p>
          </table:table-cell>
        </table:table-row>
        <table:table-row>
          <table:table-cell table:style-name="Tabela1.A1" office:value-type="string">
            <text:p text:style-name="P54"><text:span text:style-name="T39">Imunidade a t</text:span>ransitoriedade das bibliotecas de interface gráfica. (Bibliotecas de interface gráfica são efêmeras)</text:p>
          </table:table-cell>
          <table:table-cell table:style-name="Tabela1.A1" office:value-type="string">
            <text:p text:style-name="P55">Utilização de metadados para desenvolvimento das telas generalizáveis <text:span text:style-name="T40">(v</text:span><text:span text:style-name="T41">ide 3.3</text:span><text:span text:style-name="T40">) , desenvolvimento de páginas específicas e componentes reutilizáveis.</text:span></text:p>
          </table:table-cell>
        </table:table-row>
        <table:table-row>
          <table:table-cell table:style-name="Tabela1.A1" office:value-type="string">
            <text:p text:style-name="P56"><text:span text:style-name="T42">Desacoplamento</text:span> das regras de negócio ao invólucro da aplicação.</text:p>
          </table:table-cell>
          <table:table-cell table:style-name="Tabela1.A1" office:value-type="string">
            <text:p text:style-name="P56">Extração das regras para serviços hierarquizados. Ex: Serviços de domínio (Executam operações básicas) e serviços de orquestração (Executam fluxos inteiros e dependem de serviços de domínio).</text:p>
          </table:table-cell>
        </table:table-row>
        <table:table-row>
          <table:table-cell table:style-name="Tabela1.A1" office:value-type="string">
            <text:p text:style-name="P57">Mensageria assíncrona</text:p>
          </table:table-cell>
          <table:table-cell table:style-name="Tabela1.A1" office:value-type="string">
            <text:p text:style-name="P57">RabbitMQ ou mediadores de mensagem como serviço na nuvem</text:p>
          </table:table-cell>
        </table:table-row>
        <table:table-row>
          <table:table-cell table:style-name="Tabela1.A1" office:value-type="string">
            <text:p text:style-name="P58">Mensageria síncrona</text:p>
          </table:table-cell>
          <table:table-cell table:style-name="Tabela1.A1" office:value-type="string">
            <text:p text:style-name="P58">Websockets ou SignalIR</text:p>
          </table:table-cell>
        </table:table-row>
        <table:table-row>
          <table:table-cell table:style-name="Tabela1.A1" office:value-type="string">
            <text:p text:style-name="P59">Ecossistema de interface gráfica moderno</text:p>
          </table:table-cell>
          <table:table-cell table:style-name="Tabela1.A1" office:value-type="string">
            <text:p text:style-name="P59">REACT</text:p>
          </table:table-cell>
        </table:table-row>
      </table:table>
      <text:p text:style-name="P45"/>
      <text:p text:style-name="P7"/>
      <text:p text:style-name="P10"><text:span text:style-name="T43">4</text:span> - Conclusão</text:p>
      <text:p text:style-name="P7"/>
      <text:p text:style-name="P60">A arquitetura proposta é sólida e baseada nas necessidades identificadas através de projetos anteriores desenvolvidos nas próprias PJF e EMTEC, assim como aqueles executados durante a atuação no meio privado. <text:span text:style-name="T44">As necessidades e os problemas mais críticos foram apontados e tratados para formar uma base </text:span><text:span text:style-name="T4">que suporte a </text:span><text:span text:style-name="T44">transitoriedade</text:span><text:span text:style-name="T4"> da</text:span><text:span text:style-name="T44">s</text:span><text:span text:style-name="T4"> tecnologia</text:span><text:span text:style-name="T44">s</text:span><text:span text:style-name="T4">, possibilitando a evolução independente e em última instância, a substituição indolor, adaptação ou compatibilização das peças desenvolvidas.</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11T15:22:57.762725900</meta:creation-date>
    <dc:date>2026-07-02T17:05:11.124602100</dc:date>
    <meta:editing-duration>P1DT3H20M14S</meta:editing-duration>
    <meta:editing-cycles>224</meta:editing-cycles>
    <meta:generator>LibreOffice/25.2.7.2$Windows_X86_64 LibreOffice_project/5cbfd1ab6520636bb5f7b99185aa69bd7456825d</meta:generator>
    <meta:print-date>2026-06-12T13:27:05.816476900</meta:print-date>
    <meta:printed-by>Arquivos PDF</meta:printed-by>
    <meta:document-statistic meta:table-count="1" meta:image-count="2" meta:object-count="0" meta:page-count="7" meta:paragraph-count="113" meta:word-count="1663" meta:character-count="11954" meta:non-whitespace-character-count="10088"/>
  </office:meta>
</office:document-meta>
</file>